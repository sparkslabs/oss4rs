
<file path=META-INF/manifest.xml><?xml version="1.0" encoding="utf-8"?>
<manifest:manifest xmlns:manifest="urn:oasis:names:tc:opendocument:xmlns:manifest:1.0" xmlns:loext="urn:org:documentfoundation:names:experimental:office:xmlns:loext:1.0" xmlns:coext="urn:com:collaboraoffice:names:experimental:office:xmlns:c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F400000251C0B177A8.png" manifest:media-type="image/png"/>
  <manifest:file-entry manifest:full-path="Pictures/1000000000000258000000BF916919B6.png" manifest:media-type="image/png"/>
  <manifest:file-entry manifest:full-path="Pictures/100000010000080000000800F51FBBD0.png" manifest:media-type="image/png"/>
  <manifest:file-entry manifest:full-path="Pictures/10000001000005D300000365B8B758C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css3t="http://www.w3.org/TR/css3-text/" xmlns:svg="urn:oasis:names:tc:opendocument:xmlns:svg-compatible:1.0" xmlns:presentation="urn:oasis:names:tc:opendocument:xmlns:presentation:1.0" xmlns:field="urn:openoffice:names:experimental:ooo-ms-interop:xmlns:field:1.0" xmlns:formx="urn:openoffice:names:experimental:ooxml-odf-interop:xmlns:form:1.0" xmlns:chart="urn:oasis:names:tc:opendocument:xmlns:chart:1.0" xmlns:officeooo="http://openoffice.org/2009/office" xmlns:table="urn:oasis:names:tc:opendocument:xmlns:table:1.0" xmlns:coext="urn:com:collaboraoffice:names:experimental:office:xmlns:coext:1.0" xmlns:number="urn:oasis:names:tc:opendocument:xmlns:datastyle:1.0" xmlns:meta="urn:oasis:names:tc:opendocument:xmlns:meta:1.0" xmlns:loext="urn:org:documentfoundation:names:experimental:office:xmlns:loext:1.0" office:version="1.4">
  <office:scripts/>
  <office:font-face-decls>
    <style:font-face style:name="Calibri" svg:font-family="Calibri"/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/>
    <style:font-face style:name="Times New Roman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svg:stroke-width="0.106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width="0.106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4" style:family="graphic" style:parent-style-name="standard" style:list-style-name="L7">
      <style:graphic-properties draw:stroke="none" svg:stroke-width="0.106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" style:family="graphic" style:parent-style-name="standard" style:list-style-name="L8">
      <style:graphic-properties draw:stroke="none" svg:stroke-width="0.106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" style:family="graphic" style:parent-style-name="standard">
      <style:graphic-properties draw:stroke="solid" svg:stroke-width="0.106cm" svg:stroke-color="#274c7b" draw:stroke-linejoin="round" draw:fill="solid" draw:fill-color="#ff0000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pr1" style:family="presentation" style:parent-style-name="Default_20_4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11.735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Default_20_4-subtitle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Default_20_4-notes">
      <style:graphic-properties draw:fill-color="#ffffff" draw:auto-grow-height="false" fo:min-height="12.573cm" loext:decorative="false"/>
      <style:paragraph-properties style:writing-mode="lr-tb"/>
    </style:style>
    <style:style style:name="pr4" style:family="presentation" style:parent-style-name="Default_20_2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3.913cm" fo:padding-top="0cm" fo:padding-bottom="0cm" fo:padding-left="0cm" fo:padding-right="0cm" fo:wrap-option="wrap" loext:decorative="false"/>
      <style:paragraph-properties style:writing-mode="lr-tb"/>
    </style:style>
    <style:style style:name="pr5" style:family="presentation" style:parent-style-name="Default_20_2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885cm" fo:padding-top="0cm" fo:padding-bottom="0cm" fo:padding-left="0cm" fo:padding-right="0cm" fo:wrap-option="wrap" loext:decorative="false"/>
      <style:paragraph-properties style:writing-mode="lr-tb"/>
    </style:style>
    <style:style style:name="pr6" style:family="presentation" style:parent-style-name="Default_20_2-notes">
      <style:graphic-properties draw:fill-color="#ffffff" draw:auto-grow-height="false" fo:min-height="12.573cm" loext:decorative="false"/>
      <style:paragraph-properties style:writing-mode="lr-tb"/>
    </style:style>
    <style:style style:name="pr7" style:family="presentation" style:parent-style-name="Default_20_3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2.937cm" fo:padding-top="0cm" fo:padding-bottom="0cm" fo:padding-left="0cm" fo:padding-right="0cm" fo:wrap-option="wrap" loext:decorative="false"/>
      <style:paragraph-properties style:writing-mode="lr-tb"/>
    </style:style>
    <style:style style:name="pr8" style:family="presentation" style:parent-style-name="Default_20_3-notes">
      <style:graphic-properties draw:fill-color="#ffffff" draw:auto-grow-height="false" fo:min-height="12.573cm" loext:decorative="false"/>
      <style:paragraph-properties style:writing-mode="lr-tb"/>
    </style:style>
    <style:style style:name="pr9" style:family="presentation" style:parent-style-name="Default_20_1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2.631cm" fo:padding-top="0cm" fo:padding-bottom="0cm" fo:padding-left="0cm" fo:padding-right="0cm" fo:wrap-option="wrap" loext:decorative="false"/>
      <style:paragraph-properties style:writing-mode="lr-tb"/>
    </style:style>
    <style:style style:name="pr10" style:family="presentation" style:parent-style-name="Default_20_1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885cm" fo:padding-top="0cm" fo:padding-bottom="0cm" fo:padding-left="0cm" fo:padding-right="0cm" fo:wrap-option="wrap" loext:decorative="false"/>
      <style:paragraph-properties style:writing-mode="lr-tb"/>
    </style:style>
    <style:style style:name="pr11" style:family="presentation" style:parent-style-name="Default_20_1-notes">
      <style:graphic-properties draw:fill-color="#ffffff" draw:auto-grow-height="false" fo:min-height="12.573cm" loext:decorative="false"/>
      <style:paragraph-properties style:writing-mode="lr-tb"/>
    </style:style>
    <style:style style:name="pr12" style:family="presentation" style:parent-style-name="Default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2.937cm" fo:padding-top="0cm" fo:padding-bottom="0cm" fo:padding-left="0cm" fo:padding-right="0cm" fo:wrap-option="wrap" loext:decorative="false"/>
      <style:paragraph-properties style:writing-mode="lr-tb"/>
    </style:style>
    <style:style style:name="pr13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5%" fo:text-align="center" fo:text-indent="0cm" loext:tab-stop-distance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66pt"/>
    </style:style>
    <style:style style:name="P3" style:family="paragraph">
      <style:paragraph-properties fo:margin-left="0cm" fo:margin-right="0cm" fo:margin-top="0.498cm" fo:margin-bottom="0cm" fo:line-height="105%" fo:text-align="center" fo:text-indent="0cm" loext:tab-stop-distance="0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center" style:font-independent-line-spacing="true"/>
      <style:text-properties fo:font-size="28pt"/>
    </style:style>
    <style:style style:name="P5" style:family="paragraph">
      <loext:graphic-properties draw:fill-color="#ffffff"/>
      <style:paragraph-properties style:font-independent-line-spacing="true"/>
    </style:style>
    <style:style style:name="P6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P7" style:family="paragraph">
      <style:paragraph-properties fo:margin-left="0cm" fo:margin-right="0cm" fo:margin-top="0.621cm" fo:margin-bottom="0cm" fo:line-height="105%" fo:text-align="left" fo:text-indent="0cm"/>
    </style:style>
    <style:style style:name="P8" style:family="paragraph">
      <style:paragraph-properties fo:margin-left="0cm" fo:margin-right="0cm" fo:margin-top="0.397cm" fo:margin-bottom="0cm" fo:line-height="105%" fo:text-align="left" fo:text-indent="0cm"/>
    </style:style>
    <style:style style:name="P9" style:family="paragraph">
      <loext:graphic-properties draw:fill="none"/>
      <style:paragraph-properties fo:text-align="left" style:font-independent-line-spacing="true"/>
      <style:text-properties fo:font-size="40pt"/>
    </style:style>
    <style:style style:name="P10" style:family="paragraph">
      <loext:graphic-properties draw:fill="none"/>
      <style:paragraph-properties fo:text-align="left"/>
      <style:text-properties fo:font-size="18pt"/>
    </style:style>
    <style:style style:name="P11" style:family="paragraph">
      <loext:graphic-properties draw:fill="none"/>
      <style:paragraph-properties fo:text-align="lef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P12" style:family="paragraph">
      <style:paragraph-properties fo:margin-left="0cm" fo:margin-right="0cm" fo:margin-top="0cm" fo:margin-bottom="0cm" fo:line-height="100%" fo:text-align="left" fo:text-indent="0cm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left" fo:text-indent="0cm" style:font-independent-line-spacing="true"/>
      <style:text-properties fo:font-size="18pt"/>
    </style:style>
    <style:style style:name="P14" style:family="paragraph">
      <style:paragraph-properties fo:margin-left="0cm" fo:margin-right="0cm" fo:margin-top="0.298cm" fo:margin-bottom="0cm" fo:line-height="105%" fo:text-align="left" fo:text-indent="0cm"/>
    </style:style>
    <style:style style:name="P15" style:family="paragraph">
      <style:paragraph-properties fo:margin-left="0cm" fo:margin-right="0cm" fo:margin-top="0.621cm" fo:margin-bottom="0cm" fo:line-height="105%" fo:text-align="left" fo:text-indent="0cm" loext:tab-stop-distance="0cm">
        <style:tab-stops>
          <style:tab-stop style:position="0cm"/>
        </style:tab-stops>
      </style:paragraph-properties>
    </style:style>
    <style:style style:name="P16" style:family="paragraph">
      <loext:graphic-properties draw:fill="solid" draw:fill-color="#ff0000"/>
      <style:paragraph-properties fo:text-align="lef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Source Sans Pro" fo:font-size="66pt" fo:letter-spacing="normal" fo:language="en" fo:country="US" fo:font-style="normal" style:text-underline-style="none" fo:font-weight="bold" fo:background-color="transparent" style:font-size-asian="66pt" style:font-style-asian="normal" style:font-weight-asian="bold" style:font-size-complex="66pt" style:font-style-complex="normal" style:font-weight-complex="bold"/>
    </style:style>
    <style:style style:name="T2" style:family="text">
      <style:text-properties fo:font-variant="normal" fo:text-transform="none" fo:color="#e69aba" loext:opacity="100%" style:text-outline="false" style:text-line-through-style="none" style:text-line-through-type="none" style:text-position="0% 100%" style:font-name="Source Sans Pro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" fo:font-size="44pt" fo:letter-spacing="normal" fo:language="en" fo:country="US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" fo:font-size="40pt" fo:letter-spacing="normal" fo:language="en" fo:country="US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0060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)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006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">
        <style:list-level-properties text:space-before="-0.9cm" text:min-label-width="0.9cm"/>
        <style:text-properties fo:font-family="Wingdings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">
        <style:list-level-properties text:space-before="-0.9cm" text:min-label-width="0.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">
        <style:list-level-properties text:space-before="-0.9cm" text:min-label-width="0.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000000" fo:font-size="75%"/>
      </text:list-level-style-bullet>
      <text:list-level-style-bullet text:level="3" text:bullet-char="">
        <style:list-level-properties text:space-before="2.8cm" text:min-label-width="0.8cm"/>
        <style:text-properties fo:font-family="Wingdings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-0.9cm" text:min-label-width="0.9cm"/>
        <style:text-properties fo:color="#000000" fo:font-size="45%"/>
      </text:list-level-style-number>
      <text:list-level-style-bullet text:level="2" text:bullet-char="">
        <style:list-level-properties text:space-before="1.5cm" text:min-label-width="0.9cm"/>
        <style:text-properties fo:font-family="Symbol" style:font-charset="x-symbol" fo:color="#000000" fo:font-size="75%"/>
      </text:list-level-style-bullet>
      <text:list-level-style-bullet text:level="3" text:bullet-char="">
        <style:list-level-properties text:space-before="2.8cm" text:min-label-width="0.8cm"/>
        <style:text-properties fo:font-family="Wingdings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OSS4RS: Open Source Software for the Research Software Communit" draw:style-name="dp1" draw:master-page-name="Default_20_4" presentation:presentation-page-layout-name="AL1T0">
        <draw:frame draw:name="PlaceHolder 1" presentation:style-name="pr1" draw:text-style-name="P2" draw:layer="layout" svg:width="25.195cm" svg:height="11.735cm" svg:x="1.399cm" svg:y="1.076cm" presentation:class="title" presentation:user-transformed="true">
          <draw:text-box>
            <text:p text:style-name="P1"><text:span text:style-name="T1">OSS4RS: Open Source Software for the Research Software Community</text:span></text:p>
          </draw:text-box>
        </draw:frame>
        <draw:frame draw:name="PlaceHolder 2" presentation:style-name="pr2" draw:text-style-name="P4" draw:layer="layout" svg:width="25.195cm" svg:height="4.164cm" svg:x="1.399cm" svg:y="11.709cm" presentation:class="subtitle" presentation:user-transformed="true">
          <draw:text-box>
            <text:p text:style-name="P3"><text:span text:style-name="T2">Colin Sauze, Michael Sparks and Jannetta Steyn</text:span></text:p>
          </draw:text-box>
        </draw:frame>
        <presentation:notes draw:style-name="dp2">
          <draw:page-thumbnail draw:style-name="gr1" draw:layer="layout" svg:width="18.623cm" svg:height="10.476cm" svg:x="1.483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Why don’t we use open source software more?" draw:style-name="dp1" draw:master-page-name="Default_20_2" presentation:presentation-page-layout-name="AL2T1">
        <draw:frame draw:name="PlaceHolder 1" presentation:style-name="pr4" draw:text-style-name="P6" draw:layer="layout" svg:width="25.196cm" svg:height="3.913cm" svg:x="1.27cm" svg:y="1.268cm" presentation:class="title" presentation:user-transformed="true">
          <draw:text-box>
            <text:p text:style-name="P1"><text:span text:style-name="T3">Why don’t we use open source software more?</text:span></text:p>
          </draw:text-box>
        </draw:frame>
        <draw:frame draw:name="PlaceHolder 2" presentation:style-name="pr5" draw:text-style-name="P9" draw:layer="layout" svg:width="25.196cm" svg:height="9.131cm" svg:x="1.27cm" svg:y="5.715cm" presentation:class="outline" presentation:user-transformed="true">
          <draw:text-box>
            <text:list text:style-name="L4">
              <text:list-item>
                <text:p text:style-name="P7"><text:span text:style-name="T4">“Tyranny of the default”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4">“Nobody ever got fired for buying Microsoft (IBM)”</text:span></text:p>
                  </text:list-item>
                </text:list>
              </text:list-item>
              <text:list-item>
                <text:p text:style-name="P7"><text:span text:style-name="T4">More technical expertise required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Our solution" draw:style-name="dp1" draw:master-page-name="Default_20_3" presentation:presentation-page-layout-name="AL3T19">
        <draw:frame draw:name="PlaceHolder 1" presentation:style-name="pr7" draw:text-style-name="P2" draw:layer="layout" svg:width="25.195cm" svg:height="2.937cm" svg:x="1.399cm" svg:y="5.473cm" presentation:class="title" presentation:user-transformed="true">
          <draw:text-box>
            <text:p text:style-name="P1"><text:span text:style-name="T1">Our solution</text:span></text:p>
          </draw:text-box>
        </draw:frame>
        <presentation:notes draw:style-name="dp2">
          <draw:page-thumbnail draw:style-name="gr1" draw:layer="layout" svg:width="18.623cm" svg:height="10.476cm" svg:x="1.483cm" svg:y="2.123cm" draw:page-number="3" presentation:class="page"/>
          <draw:frame presentation:style-name="pr8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Carpentries Lesson on Open Source Alternatives" draw:style-name="dp1" draw:master-page-name="Default_20_2" presentation:presentation-page-layout-name="AL2T1">
        <draw:frame draw:name="PlaceHolder 1" presentation:style-name="pr4" draw:text-style-name="P6" draw:layer="layout" svg:width="25.196cm" svg:height="3.913cm" svg:x="1.27cm" svg:y="1.268cm" presentation:class="title" presentation:user-transformed="true">
          <draw:text-box>
            <text:p text:style-name="P1"><text:span text:style-name="T3">Carpentries Lesson on Open Source Alternatives</text:span></text:p>
          </draw:text-box>
        </draw:frame>
        <draw:frame draw:name="PlaceHolder 2" presentation:style-name="pr5" draw:text-style-name="P9" draw:layer="layout" svg:width="25.196cm" svg:height="9.131cm" svg:x="1.27cm" svg:y="5.715cm" presentation:class="outline" presentation:user-transformed="true">
          <draw:text-box>
            <text:list text:style-name="L4">
              <text:list-item>
                <text:p text:style-name="P7"><text:span text:style-name="T4">Why you should use open source</text:span></text:p>
              </text:list-item>
              <text:list-item>
                <text:p text:style-name="P7"><text:span text:style-name="T4">Tools you can use: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4">NextCloud</text:span></text:p>
                  </text:list-item>
                  <text:list-item>
                    <text:p text:style-name="P8"><text:span text:style-name="T4">More coming soon (Big Blue Button, Jitsi, Mattermost et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_20_2" presentation:presentation-page-layout-name="AL2T1">
        <draw:frame draw:style-name="gr2" draw:text-style-name="P10" draw:layer="layout" svg:width="23.424cm" svg:height="13.645cm" svg:x="0.039cm" svg:y="0.635cm">
          <draw:image xlink:href="Pictures/10000001000005D300000365B8B758CD.png" xlink:type="simple" xlink:show="embed" xlink:actuate="onLoad" draw:mime-type="image/png">
            <text:p/>
          </draw:image>
        </draw:frame>
        <draw:custom-shape draw:style-name="gr3" draw:text-style-name="P11" draw:layer="layout" svg:width="7.997cm" svg:height="1.282cm" svg:x="10cm" svg:y="5.3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13" draw:layer="layout" svg:width="19.685cm" svg:height="1.786cm" svg:x="0.635cm" svg:y="14.607cm">
          <text:p text:style-name="P12"><text:span text:style-name="T5"><text:a xlink:href="https://github.com/sparkslab/oss4rs" xlink:type="simple">https://github.com/sparkslab/oss4rs</text:a></text:span></text:p>
          <text:p text:style-name="P12"><text:span text:style-name="T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0" draw:layer="layout" svg:width="6.073cm" svg:height="6.102cm" svg:x="21.594cm" svg:y="9.527cm">
          <draw:image xlink:href="Pictures/100000010000080000000800F51FBBD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3cm" svg:height="10.476cm" svg:x="1.483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How we worked" draw:style-name="dp1" draw:master-page-name="Default_20_1" presentation:presentation-page-layout-name="AL2T1">
        <draw:frame draw:name="PlaceHolder 1" presentation:style-name="pr9" draw:text-style-name="P6" draw:layer="layout" svg:width="25.196cm" svg:height="2.631cm" svg:x="1.399cm" svg:y="0.625cm" presentation:class="title" presentation:user-transformed="true">
          <draw:text-box>
            <text:p text:style-name="P1"><text:span text:style-name="T3">How we worked</text:span></text:p>
          </draw:text-box>
        </draw:frame>
        <draw:frame draw:name="PlaceHolder 2" presentation:style-name="pr10" draw:text-style-name="P9" draw:layer="layout" svg:width="25.273cm" svg:height="10.921cm" svg:x="1.399cm" svg:y="3.684cm" presentation:class="outline" presentation:user-transformed="true">
          <draw:text-box>
            <text:list text:style-name="L9">
              <text:list-item>
                <text:p text:style-name="P7"><text:span text:style-name="T4">Morning:</text:span></text:p>
              </text:list-item>
            </text:list>
            <text:list text:style-name="L10">
              <text:list-item>
                <text:list>
                  <text:list-item>
                    <text:p text:style-name="P8"><text:span text:style-name="T7">Everyone looked at using some of the office tool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14"><text:span text:style-name="T8">NextCloud (running on Jannetta’s Raspberry Pi at home)</text:span></text:p>
                      </text:list-item>
                      <text:list-item>
                        <text:p text:style-name="P14"><text:span text:style-name="T8">Cryptpad</text:span></text:p>
                      </text:list-item>
                      <text:list-item>
                        <text:p text:style-name="P14"><text:span text:style-name="T8">OnlyOffice</text:span></text:p>
                      </text:list-item>
                    </text:list>
                  </text:list-item>
                </text:list>
              </text:list-item>
            </text:list>
            <text:p text:style-name="P15"><text:span text:style-name="T4"/></text:p>
          </draw:text-box>
        </draw:frame>
        <presentation:notes draw:style-name="dp2">
          <draw:page-thumbnail draw:style-name="gr1" draw:layer="layout" svg:width="18.623cm" svg:height="10.476cm" svg:x="1.483cm" svg:y="2.123cm" draw:page-number="6" presentation:class="page"/>
          <draw:frame presentation:style-name="pr11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How we worked continued" draw:style-name="dp1" draw:master-page-name="Default_20_1" presentation:presentation-page-layout-name="AL2T1">
        <draw:frame draw:name="PlaceHolder 1" presentation:style-name="pr9" draw:text-style-name="P6" draw:layer="layout" svg:width="25.196cm" svg:height="2.631cm" svg:x="1.399cm" svg:y="0.625cm" presentation:class="title" presentation:user-transformed="true">
          <draw:text-box>
            <text:p text:style-name="P1"><text:span text:style-name="T3">How we worked continued</text:span></text:p>
          </draw:text-box>
        </draw:frame>
        <draw:frame draw:name="PlaceHolder 2" presentation:style-name="pr10" draw:text-style-name="P9" draw:layer="layout" svg:width="25.196cm" svg:height="9.131cm" svg:x="1.399cm" svg:y="3.684cm" presentation:class="outline" presentation:user-transformed="true">
          <draw:text-box>
            <text:list text:style-name="L9">
              <text:list-item>
                <text:p text:style-name="P7"><text:span text:style-name="T4">Afternoon:</text:span></text:p>
              </text:list-item>
            </text:list>
            <text:list text:style-name="L10">
              <text:list-item>
                <text:list>
                  <text:list-item>
                    <text:p text:style-name="P8"><text:span text:style-name="T7">Colin – wrote intro section</text:span></text:p>
                  </text:list-item>
                  <text:list-item>
                    <text:p text:style-name="P8"><text:span text:style-name="T7">Jannetta – wrote Nextcloud section</text:span></text:p>
                  </text:list-item>
                  <text:list-item>
                    <text:p text:style-name="P8"><text:span text:style-name="T7">Michael – wrote tools sec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7" presentation:class="page"/>
          <draw:frame presentation:style-name="pr11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Thank you!" draw:style-name="dp1" draw:master-page-name="Default" presentation:presentation-page-layout-name="AL1T0">
        <draw:frame draw:name="PlaceHolder 1" presentation:style-name="pr12" draw:text-style-name="P6" draw:layer="layout" svg:width="25.195cm" svg:height="2.937cm" svg:x="1.905cm" svg:y="1.903cm" presentation:class="title" presentation:user-transformed="true">
          <draw:text-box>
            <text:p text:style-name="P1"><text:span text:style-name="T1">Thank you!</text:span></text:p>
          </draw:text-box>
        </draw:frame>
        <draw:custom-shape draw:style-name="gr5" draw:text-style-name="P13" draw:layer="layout" svg:width="7.997cm" svg:height="1.265cm" svg:x="12.067cm" svg:y="13.972cm">
          <text:p text:style-name="P12"><text:span text:style-name="T6">Thank you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0" draw:layer="layout" svg:width="10.805cm" svg:height="3.329cm" svg:x="17.147cm" svg:y="5.08cm">
          <draw:image xlink:href="Pictures/1000000000000258000000BF916919B6.png" xlink:type="simple" xlink:show="embed" xlink:actuate="onLoad" draw:mime-type="image/png">
            <text:p/>
          </draw:image>
        </draw:frame>
        <draw:frame draw:style-name="gr2" draw:text-style-name="P10" draw:layer="layout" svg:width="8.405cm" svg:height="9.971cm" svg:x="0.635cm" svg:y="2.54cm">
          <draw:image xlink:href="Pictures/10000001000001F400000251C0B177A8.png" xlink:type="simple" xlink:show="embed" xlink:actuate="onLoad" draw:mime-type="image/png">
            <text:p/>
          </draw:image>
        </draw:frame>
        <draw:custom-shape draw:style-name="gr6" draw:text-style-name="P16" draw:layer="layout" svg:width="5.078cm" svg:height="3.727cm" svg:x="10.162cm" svg:y="5.08cm">
          <text:p/>
          <draw:enhanced-geometry draw:mirror-horizontal="false" draw:mirror-vertical="false" draw:glue-points="?f4 ?f5 ?f6 ?f7 ?f8 ?f9 ?f10 ?f11" drawooo:sub-view-size="21600 21600" draw:text-areas="?f0 ?f2 ?f1 ?f3" svg:viewBox="0 0 0 0" draw:type="ooxml-non-primitive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>
            <draw:equation draw:name="f0" draw:formula="211680*logwidth/1828440"/>
            <draw:equation draw:name="f1" draw:formula="1617120*logwidth/1828440"/>
            <draw:equation draw:name="f2" draw:formula="217440*logheight/1342080"/>
            <draw:equation draw:name="f3" draw:formula="652680*logheight/1342080"/>
            <draw:equation draw:name="f4" draw:formula="10800*logwidth/21600"/>
            <draw:equation draw:name="f5" draw:formula="0*logheight/21600"/>
            <draw:equation draw:name="f6" draw:formula="0*logwidth/21600"/>
            <draw:equation draw:name="f7" draw:formula="10800*logheight/21600"/>
            <draw:equation draw:name="f8" draw:formula="10800*logwidth/21600"/>
            <draw:equation draw:name="f9" draw:formula="21600*logheight/21600"/>
            <draw:equation draw:name="f10" draw:formula="21600*logwidth/21600"/>
            <draw:equation draw:name="f11" draw:formula="10800*logheight/216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13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css3t="http://www.w3.org/TR/css3-text/" xmlns:svg="urn:oasis:names:tc:opendocument:xmlns:svg-compatible:1.0" xmlns:presentation="urn:oasis:names:tc:opendocument:xmlns:presentation:1.0" xmlns:field="urn:openoffice:names:experimental:ooo-ms-interop:xmlns:field:1.0" xmlns:chart="urn:oasis:names:tc:opendocument:xmlns:chart:1.0" xmlns:officeooo="http://openoffice.org/2009/office" xmlns:table="urn:oasis:names:tc:opendocument:xmlns:table:1.0" xmlns:coext="urn:com:collaboraoffice:names:experimental:office:xmlns:coext:1.0" xmlns:number="urn:oasis:names:tc:opendocument:xmlns:datastyle:1.0" xmlns:meta="urn:oasis:names:tc:opendocument:xmlns:meta:1.0" xmlns:loext="urn:org:documentfoundation:names:experimental:office:xmlns:loext:1.0" office:version="1.4">
  <office:font-face-decls>
    <style:font-face style:name="Calibri" svg:font-family="Calibri"/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Carlito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.106cm" svg:stroke-color="#274c7b" draw:marker-start-width="0.2cm" draw:marker-start-center="false" draw:marker-end-width="0.2cm" draw:marker-end-center="false" draw:fill="solid" draw:fill-color="#3465a4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loext:stroke-complex-color loext:theme-type="accent1" loext:color-type="theme">
          <loext:transformation loext:type="lummod" loext:value="7500"/>
          <loext:transformation loext:type="lumoff" loext:value="0"/>
        </loext:stroke-complex-color>
        <loext:fill-complex-color loext:theme-type="accent1" loext:color-type="theme"/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loext:font-optical-sizing="auto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 loext:font-optical-sizing="auto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 loext:font-optical-sizing="auto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loext:font-optical-sizing="auto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">
            <style:list-level-properties text:space-before="-0.9cm" text:min-label-width="0.9cm"/>
            <style:text-properties fo:font-family="Wingdings" style:font-charset="x-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21cm" fo:margin-bottom="0cm" fo:line-height="105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" fo:font-family="'Source Sans Pro'" fo:font-size="40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 loext:font-optical-sizing="auto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7cm" fo:margin-bottom="0cm" fo:line-height="105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" fo:font-family="'Source Sans Pro'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298cm" fo:margin-bottom="0cm" fo:line-height="105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" fo:font-family="'Source Sans Pro'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198cm" fo:margin-bottom="0cm" fo:line-height="105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" fo:font-family="'Source Sans Pro'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.098cm" fo:margin-bottom="0cm" fo:line-height="105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" fo:font-family="'Source Sans Pro'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6" style:family="presentation" style:parent-style-name="Default-outline5">
      <style:paragraph-properties fo:margin-left="0cm" fo:margin-right="0cm" fo:margin-top="0.098cm" fo:margin-bottom="0cm" fo:line-height="105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" fo:font-family="'Source Sans Pro'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7" style:family="presentation" style:parent-style-name="Default-outline6">
      <style:paragraph-properties fo:margin-left="0cm" fo:margin-right="0cm" fo:margin-top="0.098cm" fo:margin-bottom="0cm" fo:line-height="105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" fo:font-family="'Source Sans Pro'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loext:font-optical-sizing="auto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5%" fo:text-align="center" fo:text-indent="0cm" loext:tab-stop-distance="0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" fo:font-family="'Source Sans Pro'" fo:font-size="44pt" fo:letter-spacing="normal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DejaVu Sans" style:font-family-complex="'DejaVu Sans'" style:font-family-generic-complex="system" style:font-pitch-complex="variable" style:font-size-complex="44pt" style:font-style-complex="normal" style:font-weight-complex="bold" style:text-emphasize="none" style:font-relief="none" loext:font-optical-sizing="auto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 loext:font-optical-sizing="auto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 loext:font-optical-sizing="auto"/>
    </style:style>
    <style:style style:name="Default_20_1-notes" style:display-name="Default 1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loext:font-optical-sizing="auto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">
            <style:list-level-properties text:space-before="-0.9cm" text:min-label-width="0.9cm"/>
            <style:text-properties fo:font-family="Wingdings" style:font-charset="x-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21cm" fo:margin-bottom="0cm" fo:line-height="105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" fo:font-family="'Source Sans Pro'" fo:font-size="40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 loext:font-optical-sizing="auto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397cm" fo:margin-bottom="0cm" fo:line-height="105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" fo:font-family="'Source Sans Pro'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298cm" fo:margin-bottom="0cm" fo:line-height="105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" fo:font-family="'Source Sans Pro'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198cm" fo:margin-bottom="0cm" fo:line-height="105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" fo:font-family="'Source Sans Pro'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098cm" fo:margin-bottom="0cm" fo:line-height="105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" fo:font-family="'Source Sans Pro'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098cm" fo:margin-bottom="0cm" fo:line-height="105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" fo:font-family="'Source Sans Pro'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098cm" fo:margin-bottom="0cm" fo:line-height="105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" fo:font-family="'Source Sans Pro'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loext:font-optical-sizing="auto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5%" fo:text-align="center" fo:text-indent="0cm" loext:tab-stop-distance="0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" fo:font-family="'Source Sans Pro'" fo:font-size="44pt" fo:letter-spacing="normal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DejaVu Sans" style:font-family-complex="'DejaVu Sans'" style:font-family-generic-complex="system" style:font-pitch-complex="variable" style:font-size-complex="44pt" style:font-style-complex="normal" style:font-weight-complex="bold" style:text-emphasize="none" style:font-relief="none" loext:font-optical-sizing="auto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 loext:font-optical-sizing="auto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 loext:font-optical-sizing="auto"/>
    </style:style>
    <style:style style:name="Default_20_2-notes" style:display-name="Default 2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loext:font-optical-sizing="auto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">
            <style:list-level-properties text:space-before="-0.9cm" text:min-label-width="0.9cm"/>
            <style:text-properties fo:font-family="Wingdings" style:font-charset="x-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21cm" fo:margin-bottom="0cm" fo:line-height="105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" fo:font-family="'Source Sans Pro'" fo:font-size="40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 loext:font-optical-sizing="auto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.397cm" fo:margin-bottom="0cm" fo:line-height="105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" fo:font-family="'Source Sans Pro'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.298cm" fo:margin-bottom="0cm" fo:line-height="105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" fo:font-family="'Source Sans Pro'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.198cm" fo:margin-bottom="0cm" fo:line-height="105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" fo:font-family="'Source Sans Pro'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.098cm" fo:margin-bottom="0cm" fo:line-height="105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" fo:font-family="'Source Sans Pro'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.098cm" fo:margin-bottom="0cm" fo:line-height="105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" fo:font-family="'Source Sans Pro'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.098cm" fo:margin-bottom="0cm" fo:line-height="105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" fo:font-family="'Source Sans Pro'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loext:font-optical-sizing="auto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5%" fo:text-align="center" fo:text-indent="0cm" loext:tab-stop-distance="0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" fo:font-family="'Source Sans Pro'" fo:font-size="44pt" fo:letter-spacing="normal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DejaVu Sans" style:font-family-complex="'DejaVu Sans'" style:font-family-generic-complex="system" style:font-pitch-complex="variable" style:font-size-complex="44pt" style:font-style-complex="normal" style:font-weight-complex="bold" style:text-emphasize="none" style:font-relief="none" loext:font-optical-sizing="auto" style:text-overline-style="none" style:text-overline-color="font-color"/>
    </style:style>
    <style:style style:name="Title-background" style:family="presentation">
      <style:graphic-properties draw:stroke="none" draw:fill="solid" draw:fill-color="#a7074b"/>
      <style:text-properties style:letter-kerning="true" loext:font-optical-sizing="auto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 loext:font-optical-sizing="auto"/>
    </style:style>
    <style:style style:name="Titl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loext:font-optical-sizing="auto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number text:level="1" style:num-suffix=")" style:num-format="1">
            <style:list-level-properties text:space-before="-0.9cm" text:min-label-width="0.9cm"/>
            <style:text-properties fo:color="#ffffff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line-height="105%" fo:text-align="center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Source Sans Pro" fo:font-family="'Source Sans Pro'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loext:font-optical-sizing="auto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7cm" fo:margin-bottom="0cm" fo:line-height="105%" fo:text-align="center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Source Sans Pro" fo:font-family="'Source Sans Pro'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298cm" fo:margin-bottom="0cm" fo:line-height="105%" fo:text-align="center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Source Sans Pro" fo:font-family="'Source Sans Pro'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198cm" fo:margin-bottom="0cm" fo:line-height="105%" fo:text-align="center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Source Sans Pro" fo:font-family="'Source Sans Pro'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098cm" fo:margin-bottom="0cm" fo:line-height="105%" fo:text-align="center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Source Sans Pro" fo:font-family="'Source Sans Pro'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-outline6" style:family="presentation" style:parent-style-name="Title-outline5">
      <style:paragraph-properties fo:margin-left="0cm" fo:margin-right="0cm" fo:margin-top="0.098cm" fo:margin-bottom="0cm" fo:line-height="105%" fo:text-align="center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Source Sans Pro" fo:font-family="'Source Sans Pro'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-outline7" style:family="presentation" style:parent-style-name="Title-outline6">
      <style:paragraph-properties fo:margin-left="0cm" fo:margin-right="0cm" fo:margin-top="0.098cm" fo:margin-bottom="0cm" fo:line-height="105%" fo:text-align="center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Source Sans Pro" fo:font-family="'Source Sans Pro'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loext:font-optical-sizing="auto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5%" fo:text-align="center" fo:text-indent="0cm" loext:tab-stop-distance="0cm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Source Sans Pro" fo:font-family="'Source Sans Pro'" fo:font-size="66pt" fo:letter-spacing="normal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66pt" style:font-style-asian="normal" style:font-weight-asian="bold" style:font-name-complex="DejaVu Sans" style:font-family-complex="'DejaVu Sans'" style:font-family-generic-complex="system" style:font-pitch-complex="variable" style:font-size-complex="66pt" style:font-style-complex="normal" style:font-weight-complex="bold" style:text-emphasize="none" style:font-relief="none" loext:font-optical-sizing="auto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a7074b"/>
      <style:text-properties style:letter-kerning="true" loext:font-optical-sizing="auto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 loext:font-optical-sizing="auto"/>
    </style:style>
    <style:style style:name="Default_20_3-notes" style:display-name="Default 3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loext:font-optical-sizing="auto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>
        <text:list-style style:name="Default_20_3-outline1" style:display-name="Default 3-outline1">
          <text:list-level-style-number text:level="1" style:num-suffix=")" style:num-format="1">
            <style:list-level-properties text:space-before="-0.9cm" text:min-label-width="0.9cm"/>
            <style:text-properties fo:color="#ffffff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line-height="105%" fo:text-align="center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Source Sans Pro" fo:font-family="'Source Sans Pro'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loext:font-optical-sizing="auto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left="0cm" fo:margin-right="0cm" fo:margin-top="0.397cm" fo:margin-bottom="0cm" fo:line-height="105%" fo:text-align="center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Source Sans Pro" fo:font-family="'Source Sans Pro'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left="0cm" fo:margin-right="0cm" fo:margin-top="0.298cm" fo:margin-bottom="0cm" fo:line-height="105%" fo:text-align="center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Source Sans Pro" fo:font-family="'Source Sans Pro'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left="0cm" fo:margin-right="0cm" fo:margin-top="0.198cm" fo:margin-bottom="0cm" fo:line-height="105%" fo:text-align="center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Source Sans Pro" fo:font-family="'Source Sans Pro'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left="0cm" fo:margin-right="0cm" fo:margin-top="0.098cm" fo:margin-bottom="0cm" fo:line-height="105%" fo:text-align="center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Source Sans Pro" fo:font-family="'Source Sans Pro'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3-outline6" style:display-name="Default 3-outline6" style:family="presentation" style:parent-style-name="Default_20_3-outline5">
      <style:paragraph-properties fo:margin-left="0cm" fo:margin-right="0cm" fo:margin-top="0.098cm" fo:margin-bottom="0cm" fo:line-height="105%" fo:text-align="center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Source Sans Pro" fo:font-family="'Source Sans Pro'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3-outline7" style:display-name="Default 3-outline7" style:family="presentation" style:parent-style-name="Default_20_3-outline6">
      <style:paragraph-properties fo:margin-left="0cm" fo:margin-right="0cm" fo:margin-top="0.098cm" fo:margin-bottom="0cm" fo:line-height="105%" fo:text-align="center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Source Sans Pro" fo:font-family="'Source Sans Pro'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loext:font-optical-sizing="auto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5%" fo:text-align="center" fo:text-indent="0cm" loext:tab-stop-distance="0cm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Source Sans Pro" fo:font-family="'Source Sans Pro'" fo:font-size="66pt" fo:letter-spacing="normal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66pt" style:font-style-asian="normal" style:font-weight-asian="bold" style:font-name-complex="DejaVu Sans" style:font-family-complex="'DejaVu Sans'" style:font-family-generic-complex="system" style:font-pitch-complex="variable" style:font-size-complex="66pt" style:font-style-complex="normal" style:font-weight-complex="bold" style:text-emphasize="none" style:font-relief="none" loext:font-optical-sizing="auto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a7074b"/>
      <style:text-properties style:letter-kerning="true" loext:font-optical-sizing="auto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 loext:font-optical-sizing="auto"/>
    </style:style>
    <style:style style:name="Default_20_4-notes" style:display-name="Default 4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loext:font-optical-sizing="auto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>
        <text:list-style style:name="Default_20_4-outline1" style:display-name="Default 4-outline1">
          <text:list-level-style-number text:level="1" style:num-suffix=")" style:num-format="1">
            <style:list-level-properties text:space-before="-0.9cm" text:min-label-width="0.9cm"/>
            <style:text-properties fo:color="#ffffff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line-height="105%" fo:text-align="center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Source Sans Pro" fo:font-family="'Source Sans Pro'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loext:font-optical-sizing="auto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left="0cm" fo:margin-right="0cm" fo:margin-top="0.397cm" fo:margin-bottom="0cm" fo:line-height="105%" fo:text-align="center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Source Sans Pro" fo:font-family="'Source Sans Pro'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left="0cm" fo:margin-right="0cm" fo:margin-top="0.298cm" fo:margin-bottom="0cm" fo:line-height="105%" fo:text-align="center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Source Sans Pro" fo:font-family="'Source Sans Pro'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left="0cm" fo:margin-right="0cm" fo:margin-top="0.198cm" fo:margin-bottom="0cm" fo:line-height="105%" fo:text-align="center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Source Sans Pro" fo:font-family="'Source Sans Pro'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left="0cm" fo:margin-right="0cm" fo:margin-top="0.098cm" fo:margin-bottom="0cm" fo:line-height="105%" fo:text-align="center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Source Sans Pro" fo:font-family="'Source Sans Pro'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4-outline6" style:display-name="Default 4-outline6" style:family="presentation" style:parent-style-name="Default_20_4-outline5">
      <style:paragraph-properties fo:margin-left="0cm" fo:margin-right="0cm" fo:margin-top="0.098cm" fo:margin-bottom="0cm" fo:line-height="105%" fo:text-align="center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Source Sans Pro" fo:font-family="'Source Sans Pro'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4-outline7" style:display-name="Default 4-outline7" style:family="presentation" style:parent-style-name="Default_20_4-outline6">
      <style:paragraph-properties fo:margin-left="0cm" fo:margin-right="0cm" fo:margin-top="0.098cm" fo:margin-bottom="0cm" fo:line-height="105%" fo:text-align="center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Source Sans Pro" fo:font-family="'Source Sans Pro'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loext:font-optical-sizing="auto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5%" fo:text-align="center" fo:text-indent="0cm" loext:tab-stop-distance="0cm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Source Sans Pro" fo:font-family="'Source Sans Pro'" fo:font-size="66pt" fo:letter-spacing="normal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66pt" style:font-style-asian="normal" style:font-weight-asian="bold" style:font-name-complex="DejaVu Sans" style:font-family-complex="'DejaVu Sans'" style:font-family-generic-complex="system" style:font-pitch-complex="variable" style:font-size-complex="66pt" style:font-style-complex="normal" style:font-weight-complex="bold" style:text-emphasize="none" style:font-relief="none" loext:font-optical-sizing="auto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a7074b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a7074b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</style:style>
    <style:style style:name="Mpr1" style:family="presentation" style:parent-style-name="Defaul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63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Defau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3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" style:family="presentation" style:parent-style-name="Default_20_1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63cm" fo:padding-top="0cm" fo:padding-bottom="0cm" fo:padding-left="0cm" fo:padding-right="0cm" fo:wrap-option="wrap" loext:decorative="false"/>
      <style:paragraph-properties style:writing-mode="lr-tb"/>
    </style:style>
    <style:style style:name="Mpr7" style:family="presentation" style:parent-style-name="Default_20_1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Default_20_1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Default_20_2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63cm" fo:padding-top="0cm" fo:padding-bottom="0cm" fo:padding-left="0cm" fo:padding-right="0cm" fo:wrap-option="wrap" loext:decorative="false"/>
      <style:paragraph-properties style:writing-mode="lr-tb"/>
    </style:style>
    <style:style style:name="Mpr12" style:family="presentation" style:parent-style-name="Default_20_2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13" style:family="presentation" style:parent-style-name="Default_20_2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Default_20_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5" style:family="presentation" style:parent-style-name="Default_20_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6" style:family="presentation" style:parent-style-name="Titl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63cm" fo:padding-top="0cm" fo:padding-bottom="0cm" fo:padding-left="0cm" fo:padding-right="0cm" fo:wrap-option="wrap" loext:decorative="false"/>
      <style:paragraph-properties style:writing-mode="lr-tb"/>
    </style:style>
    <style:style style:name="Mpr17" style:family="presentation" style:parent-style-name="Titl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18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19" style:family="presentation" style:parent-style-name="Titl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0" style:family="presentation" style:parent-style-name="Titl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1" style:family="presentation" style:parent-style-name="Default_20_3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63cm" fo:padding-top="0cm" fo:padding-bottom="0cm" fo:padding-left="0cm" fo:padding-right="0cm" fo:wrap-option="wrap" loext:decorative="false"/>
      <style:paragraph-properties style:writing-mode="lr-tb"/>
    </style:style>
    <style:style style:name="Mpr22" style:family="presentation" style:parent-style-name="Default_20_3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Default_20_3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24" style:family="presentation" style:parent-style-name="Default_20_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5" style:family="presentation" style:parent-style-name="Default_20_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6" style:family="presentation" style:parent-style-name="Default_20_4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63cm" fo:padding-top="0cm" fo:padding-bottom="0cm" fo:padding-left="0cm" fo:padding-right="0cm" fo:wrap-option="wrap" loext:decorative="false"/>
      <style:paragraph-properties style:writing-mode="lr-tb"/>
    </style:style>
    <style:style style:name="Mpr27" style:family="presentation" style:parent-style-name="Default_20_4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28" style:family="presentation" style:parent-style-name="Default_20_4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29" style:family="presentation" style:parent-style-name="Default_20_4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0" style:family="presentation" style:parent-style-name="Default_20_4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5%" fo:text-align="center" fo:text-indent="0cm" loext:tab-stop-distance="0cm">
        <style:tab-stops>
          <style:tab-stop style:position="0cm"/>
        </style:tab-stops>
      </style:paragraph-properties>
      <style:text-properties fo:font-size="44pt"/>
    </style:style>
    <style:style style:name="MP6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MP7" style:family="paragraph">
      <style:paragraph-properties fo:margin-left="0cm" fo:margin-right="0cm" fo:margin-top="0.621cm" fo:margin-bottom="0cm" fo:line-height="105%" fo:text-align="left" fo:text-indent="0cm"/>
      <style:text-properties fo:font-size="40pt"/>
    </style:style>
    <style:style style:name="MP8" style:family="paragraph">
      <style:paragraph-properties fo:margin-left="0cm" fo:margin-right="0cm" fo:margin-top="0.397cm" fo:margin-bottom="0cm" fo:line-height="105%" fo:text-align="left" fo:text-indent="0cm"/>
      <style:text-properties fo:font-size="40pt"/>
    </style:style>
    <style:style style:name="MP9" style:family="paragraph">
      <style:paragraph-properties fo:margin-left="0cm" fo:margin-right="0cm" fo:margin-top="0.298cm" fo:margin-bottom="0cm" fo:line-height="105%" fo:text-align="left" fo:text-indent="0cm"/>
      <style:text-properties fo:font-size="40pt"/>
    </style:style>
    <style:style style:name="MP10" style:family="paragraph">
      <style:paragraph-properties fo:margin-left="0cm" fo:margin-right="0cm" fo:margin-top="0.198cm" fo:margin-bottom="0cm" fo:line-height="105%" fo:text-align="left" fo:text-indent="0cm"/>
      <style:text-properties fo:font-size="40pt"/>
    </style:style>
    <style:style style:name="MP11" style:family="paragraph">
      <style:paragraph-properties fo:margin-left="0cm" fo:margin-right="0cm" fo:margin-top="0.098cm" fo:margin-bottom="0cm" fo:line-height="105%" fo:text-align="left" fo:text-indent="0cm"/>
      <style:text-properties fo:font-size="40pt"/>
    </style:style>
    <style:style style:name="MP12" style:family="paragraph">
      <loext:graphic-properties draw:fill="none"/>
      <style:paragraph-properties fo:text-align="left" style:font-independent-line-spacing="true"/>
      <style:text-properties fo:font-size="40pt"/>
    </style:style>
    <style:style style:name="MP13" style:family="paragraph">
      <style:paragraph-properties fo:margin-left="0cm" fo:margin-right="0cm" fo:margin-top="0cm" fo:margin-bottom="0cm" fo:line-height="105%" fo:text-align="center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 style:font-independent-line-spacing="true"/>
      <style:text-properties fo:font-size="14pt" style:font-size-asian="14pt" style:font-size-complex="14pt"/>
    </style:style>
    <style:style style:name="MP15" style:family="paragraph">
      <loext:graphic-properties draw:fill="solid" draw:fill-color="#a7074b"/>
      <style:paragraph-properties fo:text-align="lef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Times New Roman" fo:font-size="24pt" fo:letter-spacing="normal" fo:language="en" fo:country="US" fo:font-style="normal" style:text-underline-style="none" fo:font-weight="normal" fo:background-color="transparent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P16" style:family="paragraph">
      <style:paragraph-properties fo:margin-left="0cm" fo:margin-right="0cm" fo:margin-top="0cm" fo:margin-bottom="0cm" fo:line-height="105%" fo:text-align="left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left" style:font-independent-line-spacing="true"/>
      <style:text-properties fo:font-size="14pt" style:font-size-asian="14pt" style:font-size-complex="14pt"/>
    </style:style>
    <style:style style:name="MP18" style:family="paragraph">
      <style:paragraph-properties fo:margin-left="0cm" fo:margin-right="0cm" fo:margin-top="0cm" fo:margin-bottom="0cm" fo:line-height="105%" fo:text-align="right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9" style:family="paragraph">
      <style:paragraph-properties fo:line-height="83%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style:font-independent-line-spacing="true"/>
      <style:text-properties fo:font-size="14pt" style:font-size-asian="14pt" style:font-size-complex="14pt"/>
    </style:style>
    <style:style style:name="MP21" style:family="paragraph">
      <style:paragraph-properties fo:line-height="83%" fo:text-align="right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fo:text-align="right" style:font-independent-line-spacing="true"/>
      <style:text-properties fo:font-size="14pt" style:font-size-asian="14pt" style:font-size-complex="14pt"/>
    </style:style>
    <style:style style:name="MP23" style:family="paragraph">
      <style:paragraph-properties fo:margin-left="0cm" fo:margin-right="0cm" fo:margin-top="0cm" fo:margin-bottom="0cm" fo:line-height="105%" fo:text-align="center" fo:text-indent="0cm" loext:tab-stop-distance="0cm">
        <style:tab-stops>
          <style:tab-stop style:position="0cm"/>
        </style:tab-stops>
      </style:paragraph-properties>
      <style:text-properties fo:font-size="66pt"/>
    </style:style>
    <style:style style:name="MP24" style:family="paragraph">
      <loext:graphic-properties draw:fill="none"/>
      <style:paragraph-properties fo:text-align="center" style:font-independent-line-spacing="true"/>
      <style:text-properties fo:font-size="66pt"/>
    </style:style>
    <style:style style:name="MP25" style:family="paragraph">
      <style:paragraph-properties fo:margin-left="0cm" fo:margin-right="0cm" fo:margin-top="0.498cm" fo:margin-bottom="0cm" fo:line-height="105%" fo:text-align="center" fo:text-indent="0cm"/>
      <style:text-properties fo:font-size="28pt"/>
    </style:style>
    <style:style style:name="MP26" style:family="paragraph">
      <style:paragraph-properties fo:margin-left="0cm" fo:margin-right="0cm" fo:margin-top="0.397cm" fo:margin-bottom="0cm" fo:line-height="105%" fo:text-align="center" fo:text-indent="0cm"/>
      <style:text-properties fo:font-size="28pt"/>
    </style:style>
    <style:style style:name="MP27" style:family="paragraph">
      <style:paragraph-properties fo:margin-left="0cm" fo:margin-right="0cm" fo:margin-top="0.298cm" fo:margin-bottom="0cm" fo:line-height="105%" fo:text-align="center" fo:text-indent="0cm"/>
      <style:text-properties fo:font-size="28pt"/>
    </style:style>
    <style:style style:name="MP28" style:family="paragraph">
      <style:paragraph-properties fo:margin-left="0cm" fo:margin-right="0cm" fo:margin-top="0.198cm" fo:margin-bottom="0cm" fo:line-height="105%" fo:text-align="center" fo:text-indent="0cm"/>
      <style:text-properties fo:font-size="28pt"/>
    </style:style>
    <style:style style:name="MP29" style:family="paragraph">
      <style:paragraph-properties fo:margin-left="0cm" fo:margin-right="0cm" fo:margin-top="0.098cm" fo:margin-bottom="0cm" fo:line-height="105%" fo:text-align="center" fo:text-indent="0cm"/>
      <style:text-properties fo:font-size="28pt"/>
    </style:style>
    <style:style style:name="MP30" style:family="paragraph">
      <loext:graphic-properties draw:fill="none"/>
      <style:paragraph-properties fo:text-align="center" style:font-independent-line-spacing="true"/>
      <style:text-properties fo:font-size="28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" fo:font-size="44pt" fo:letter-spacing="normal" fo:language="en" fo:country="US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" fo:font-size="40pt" fo:letter-spacing="normal" fo:language="en" fo:country="US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999999" loext:opacity="100%" style:text-outline="false" style:text-line-through-style="none" style:text-line-through-type="none" style:text-position="0% 100%" style:font-name="Source Sans Pro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Source Sans Pro" fo:font-size="66pt" fo:letter-spacing="normal" fo:language="en" fo:country="US" fo:font-style="normal" style:text-underline-style="none" fo:font-weight="bold" fo:background-color="transparent" style:font-size-asian="66pt" style:font-style-asian="normal" style:font-weight-asian="bold" style:font-size-complex="66pt" style:font-style-complex="normal" style:font-weight-complex="bold"/>
    </style:style>
    <style:style style:name="M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Source Sans Pro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9" style:family="text">
      <style:text-properties fo:font-variant="normal" fo:text-transform="none" fo:color="#41190d" loext:opacity="100%" style:text-outline="false" style:text-line-through-style="none" style:text-line-through-type="none" style:text-position="0% 100%" style:font-name="Source Sans Pro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000000" fo:font-size="75%"/>
      </text:list-level-style-bullet>
      <text:list-level-style-bullet text:level="3" text:bullet-char="">
        <style:list-level-properties text:space-before="2.8cm" text:min-label-width="0.8cm"/>
        <style:text-properties fo:font-family="Wingdings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000000" fo:font-size="75%"/>
      </text:list-level-style-bullet>
      <text:list-level-style-bullet text:level="3" text:bullet-char="">
        <style:list-level-properties text:space-before="2.8cm" text:min-label-width="0.8cm"/>
        <style:text-properties fo:font-family="Wingdings" style:font-charset="x-symbol" fo:color="#000000" fo:font-size="45%"/>
      </text:list-level-style-bullet>
      <text:list-level-style-bullet text:level="4" text:bullet-char="">
        <style:list-level-properties text:space-before="4.2cm" text:min-label-width="0.6cm"/>
        <style:text-properties fo:font-family="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000000" fo:font-size="75%"/>
      </text:list-level-style-bullet>
      <text:list-level-style-bullet text:level="3" text:bullet-char="">
        <style:list-level-properties text:space-before="2.8cm" text:min-label-width="0.8cm"/>
        <style:text-properties fo:font-family="Wingdings" style:font-charset="x-symbol" fo:color="#000000" fo:font-size="45%"/>
      </text:list-level-style-bullet>
      <text:list-level-style-bullet text:level="4" text:bullet-char="">
        <style:list-level-properties text:space-before="4.2cm" text:min-label-width="0.6cm"/>
        <style:text-properties fo:font-family="Symbol" style:font-charset="x-symbol" fo:color="#000000" fo:font-size="75%"/>
      </text:list-level-style-bullet>
      <text:list-level-style-bullet text:level="5" text:bullet-char="">
        <style:list-level-properties text:space-before="5.4cm" text:min-label-width="0.6cm"/>
        <style:text-properties fo:font-family="Wingdings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000000" fo:font-size="75%"/>
      </text:list-level-style-bullet>
      <text:list-level-style-bullet text:level="3" text:bullet-char="">
        <style:list-level-properties text:space-before="2.8cm" text:min-label-width="0.8cm"/>
        <style:text-properties fo:font-family="Wingdings" style:font-charset="x-symbol" fo:color="#000000" fo:font-size="45%"/>
      </text:list-level-style-bullet>
      <text:list-level-style-bullet text:level="4" text:bullet-char="">
        <style:list-level-properties text:space-before="4.2cm" text:min-label-width="0.6cm"/>
        <style:text-properties fo:font-family="Symbol" style:font-charset="x-symbol" fo:color="#000000" fo:font-size="75%"/>
      </text:list-level-style-bullet>
      <text:list-level-style-bullet text:level="5" text:bullet-char="">
        <style:list-level-properties text:space-before="5.4cm" text:min-label-width="0.6cm"/>
        <style:text-properties fo:font-family="Wingdings" style:font-charset="x-symbol" fo:color="#000000" fo:font-size="45%"/>
      </text:list-level-style-bullet>
      <text:list-level-style-bullet text:level="6" text:bullet-char="">
        <style:list-level-properties text:space-before="6.6cm" text:min-label-width="0.6cm"/>
        <style:text-properties fo:font-family="Wingdings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000000" fo:font-size="75%"/>
      </text:list-level-style-bullet>
      <text:list-level-style-bullet text:level="3" text:bullet-char="">
        <style:list-level-properties text:space-before="2.8cm" text:min-label-width="0.8cm"/>
        <style:text-properties fo:font-family="Wingdings" style:font-charset="x-symbol" fo:color="#000000" fo:font-size="45%"/>
      </text:list-level-style-bullet>
      <text:list-level-style-bullet text:level="4" text:bullet-char="">
        <style:list-level-properties text:space-before="4.2cm" text:min-label-width="0.6cm"/>
        <style:text-properties fo:font-family="Symbol" style:font-charset="x-symbol" fo:color="#000000" fo:font-size="75%"/>
      </text:list-level-style-bullet>
      <text:list-level-style-bullet text:level="5" text:bullet-char="">
        <style:list-level-properties text:space-before="5.4cm" text:min-label-width="0.6cm"/>
        <style:text-properties fo:font-family="Wingdings" style:font-charset="x-symbol" fo:color="#000000" fo:font-size="45%"/>
      </text:list-level-style-bullet>
      <text:list-level-style-bullet text:level="6" text:bullet-char="">
        <style:list-level-properties text:space-before="6.6cm" text:min-label-width="0.6cm"/>
        <style:text-properties fo:font-family="Wingdings" style:font-charset="x-symbol" fo:color="#000000" fo:font-size="45%"/>
      </text:list-level-style-bullet>
      <text:list-level-style-bullet text:level="7" text:bullet-char="">
        <style:list-level-properties text:space-before="7.8cm" text:min-label-width="0.6cm"/>
        <style:text-properties fo:font-family="Wingdings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min-label-width="0.6cm"/>
        <style:text-properties fo:color="#9999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3">
      <text:list-level-style-number text:level="1" style:num-suffix=")" style:num-format="1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4">
      <text:list-level-style-number text:level="1" style:num-suffix=")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ffff" fo:font-size="100%"/>
      </text:list-level-style-number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5">
      <text:list-level-style-number text:level="1" style:num-suffix=")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ffffff" fo:font-size="100%"/>
      </text:list-level-style-number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6">
      <text:list-level-style-number text:level="1" style:num-suffix=")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ffffff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fffff" fo:font-size="100%"/>
      </text:list-level-style-number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7">
      <text:list-level-style-number text:level="1" style:num-suffix=")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ffffff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fffff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fffff" fo:font-size="100%"/>
      </text:list-level-style-number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8">
      <text:list-level-style-number text:level="1" style:num-suffix=")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ffffff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fffff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fffff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fffff" fo:font-size="100%"/>
      </text:list-level-style-number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9">
      <text:list-level-style-number text:level="1" style:num-suffix=")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ffffff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fffff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fffff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fffff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fffff" fo:font-size="100%"/>
      </text:list-level-style-number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20">
      <text:list-level-style-number text:level="1" style:num-format="">
        <style:list-level-properties text:min-label-width="0.6cm"/>
        <style:text-properties fo:color="#41190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Classic">
          <loext:color loext:name="dark1" loext:color="#000000"/>
          <loext:color loext:name="light1" loext:color="#ffffff"/>
          <loext:color loext:name="dark2" loext:color="#2e2706"/>
          <loext:color loext:name="light2" loext:color="#eeeeee"/>
          <loext:color loext:name="accent1" loext:color="#3465a4"/>
          <loext:color loext:name="accent2" loext:color="#168253"/>
          <loext:color loext:name="accent3" loext:color="#d62e4e"/>
          <loext:color loext:name="accent4" loext:color="#729fcf"/>
          <loext:color loext:name="accent5" loext:color="#5eb91e"/>
          <loext:color loext:name="accent6" loext:color="#ea7500"/>
          <loext:color loext:name="hyperlink" loext:color="#0060ff"/>
          <loext:color loext:name="followed-hyperlink" loext:color="#8020d9"/>
        </loext:theme-colors>
      </loext:theme>
      <draw:frame draw:name="PlaceHolder 1" presentation:style-name="Mpr1" draw:text-style-name="MP6" draw:layer="backgroundobjects" svg:width="25.196cm" svg:height="2.627cm" svg:x="1.399cm" svg:y="0.627cm" presentation:class="title" presentation:user-transformed="true">
        <draw:text-box>
          <text:p text:style-name="MP5"><text:span text:style-name="MT1">Click to edit the title text format</text:span></text:p>
        </draw:text-box>
      </draw:frame>
      <draw:frame draw:name="PlaceHolder 2" presentation:style-name="Mpr2" draw:text-style-name="MP12" draw:layer="backgroundobjects" svg:width="25.196cm" svg:height="9.131cm" svg:x="1.399cm" svg:y="3.684cm" presentation:class="outline" presentation:user-transformed="true">
        <draw:text-box>
          <text:list text:style-name="ML3">
            <text:list-item>
              <text:p text:style-name="MP7"><text:span text:style-name="MT2">Click to edit the outline text format</text:span></text:p>
            </text:list-item>
          </text:list>
          <text:list text:style-name="ML4">
            <text:list-item>
              <text:list>
                <text:list-item>
                  <text:p text:style-name="MP8"><text:span text:style-name="MT3">Second Outline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9"><text:span text:style-name="MT4">Third Outline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5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5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11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11"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3" draw:text-style-name="MP14" draw:layer="backgroundobjects" svg:width="8.872cm" svg:height="1.082cm" svg:x="9.575cm" svg:y="14.347cm" presentation:class="footer" presentation:user-transformed="true">
        <draw:text-box>
          <text:p text:style-name="MP13"><text:span text:style-name="MT6"><presentation:footer/></text:span></text:p>
        </draw:text-box>
      </draw:frame>
      <draw:custom-shape draw:style-name="Mgr3" draw:text-style-name="MP15" draw:layer="backgroundobjects" svg:width="27.997cm" svg:height="0.632cm" svg:x="0cm" svg:y="0.001cm">
        <text:p/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4" presentation:style-name="Mpr3" draw:text-style-name="MP17" draw:layer="backgroundobjects" svg:width="6.519cm" svg:height="1.082cm" svg:x="1.399cm" svg:y="14.347cm" presentation:class="date-time" presentation:user-transformed="true">
        <draw:text-box>
          <text:p text:style-name="MP16"><text:span text:style-name="MT6"><presentation:date-time/></text:span></text:p>
        </draw:text-box>
      </draw:frame>
      <draw:frame draw:name="PlaceHolder 5" presentation:style-name="Mpr3" draw:text-style-name="MP17" draw:layer="backgroundobjects" svg:width="6.519cm" svg:height="1.082cm" svg:x="20.075cm" svg:y="14.347cm" presentation:class="page-number" presentation:user-transformed="true">
        <draw:text-box>
          <text:p text:style-name="MP18"><text:span text:style-name="MT6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0" draw:layer="backgroundobjects" svg:width="9.369cm" svg:height="1.396cm" svg:x="0cm" svg:y="0cm" presentation:class="header">
          <draw:text-box>
            <text:p text:style-name="MP19"><presentation:header/></text:p>
          </draw:text-box>
        </draw:frame>
        <draw:frame presentation:style-name="Mpr4" draw:text-style-name="MP22" draw:layer="backgroundobjects" svg:width="9.369cm" svg:height="1.396cm" svg:x="12.22cm" svg:y="0cm" presentation:class="date-time">
          <draw:text-box>
            <text:p text:style-name="MP21"><presentation:date-time/></text:p>
          </draw:text-box>
        </draw:frame>
        <draw:frame presentation:style-name="Mpr5" draw:text-style-name="MP20" draw:layer="backgroundobjects" svg:width="9.369cm" svg:height="1.396cm" svg:x="0cm" svg:y="26.543cm" presentation:class="footer">
          <draw:text-box>
            <text:p text:style-name="MP19"><presentation:footer/></text:p>
          </draw:text-box>
        </draw:frame>
        <draw:frame presentation:style-name="Mpr5" draw:text-style-name="MP22" draw:layer="backgroundobjects" svg:width="9.369cm" svg:height="1.396cm" svg:x="12.22cm" svg:y="26.543cm" presentation:class="page-number">
          <draw:text-box>
            <text:p text:style-name="MP21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loext:theme loext:name="Office">
        <loext:theme-colors loext:name="Classic">
          <loext:color loext:name="dark1" loext:color="#000000"/>
          <loext:color loext:name="light1" loext:color="#ffffff"/>
          <loext:color loext:name="dark2" loext:color="#2e2706"/>
          <loext:color loext:name="light2" loext:color="#eeeeee"/>
          <loext:color loext:name="accent1" loext:color="#3465a4"/>
          <loext:color loext:name="accent2" loext:color="#168253"/>
          <loext:color loext:name="accent3" loext:color="#d62e4e"/>
          <loext:color loext:name="accent4" loext:color="#729fcf"/>
          <loext:color loext:name="accent5" loext:color="#5eb91e"/>
          <loext:color loext:name="accent6" loext:color="#ea7500"/>
          <loext:color loext:name="hyperlink" loext:color="#0060ff"/>
          <loext:color loext:name="followed-hyperlink" loext:color="#8020d9"/>
        </loext:theme-colors>
      </loext:theme>
      <draw:frame draw:name="PlaceHolder 1" presentation:style-name="Mpr6" draw:text-style-name="MP6" draw:layer="backgroundobjects" svg:width="25.196cm" svg:height="2.627cm" svg:x="1.399cm" svg:y="0.627cm" presentation:class="title" presentation:user-transformed="true">
        <draw:text-box>
          <text:p text:style-name="MP5"><text:span text:style-name="MT1">Click to edit the title text format</text:span></text:p>
        </draw:text-box>
      </draw:frame>
      <draw:frame draw:name="PlaceHolder 2" presentation:style-name="Mpr7" draw:text-style-name="MP12" draw:layer="backgroundobjects" svg:width="25.196cm" svg:height="9.131cm" svg:x="1.399cm" svg:y="3.684cm" presentation:class="outline" presentation:user-transformed="true">
        <draw:text-box>
          <text:list text:style-name="ML3">
            <text:list-item>
              <text:p text:style-name="MP7"><text:span text:style-name="MT2">Click to edit the outline text format</text:span></text:p>
            </text:list-item>
          </text:list>
          <text:list text:style-name="ML4">
            <text:list-item>
              <text:list>
                <text:list-item>
                  <text:p text:style-name="MP8"><text:span text:style-name="MT3">Second Outline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9"><text:span text:style-name="MT4">Third Outline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5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5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11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11"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8" draw:text-style-name="MP14" draw:layer="backgroundobjects" svg:width="8.872cm" svg:height="1.082cm" svg:x="9.575cm" svg:y="14.347cm" presentation:class="footer" presentation:user-transformed="true">
        <draw:text-box>
          <text:p text:style-name="MP13"><text:span text:style-name="MT6"><presentation:footer/></text:span></text:p>
        </draw:text-box>
      </draw:frame>
      <draw:custom-shape draw:style-name="Mgr3" draw:text-style-name="MP15" draw:layer="backgroundobjects" svg:width="27.997cm" svg:height="0.632cm" svg:x="0cm" svg:y="0.001cm">
        <text:p/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4" presentation:style-name="Mpr8" draw:text-style-name="MP17" draw:layer="backgroundobjects" svg:width="6.519cm" svg:height="1.082cm" svg:x="1.399cm" svg:y="14.347cm" presentation:class="date-time" presentation:user-transformed="true">
        <draw:text-box>
          <text:p text:style-name="MP16"><text:span text:style-name="MT6"><presentation:date-time/></text:span></text:p>
        </draw:text-box>
      </draw:frame>
      <draw:frame draw:name="PlaceHolder 5" presentation:style-name="Mpr8" draw:text-style-name="MP17" draw:layer="backgroundobjects" svg:width="6.519cm" svg:height="1.082cm" svg:x="20.075cm" svg:y="14.347cm" presentation:class="page-number" presentation:user-transformed="true">
        <draw:text-box>
          <text:p text:style-name="MP18"><text:span text:style-name="MT6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cm" svg:height="0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0" draw:layer="backgroundobjects" svg:width="9.369cm" svg:height="1.396cm" svg:x="0cm" svg:y="0cm" presentation:class="header">
          <draw:text-box>
            <text:p text:style-name="MP19"><presentation:header/></text:p>
          </draw:text-box>
        </draw:frame>
        <draw:frame presentation:style-name="Mpr9" draw:text-style-name="MP22" draw:layer="backgroundobjects" svg:width="9.369cm" svg:height="1.396cm" svg:x="12.22cm" svg:y="0cm" presentation:class="date-time">
          <draw:text-box>
            <text:p text:style-name="MP21"><presentation:date-time/></text:p>
          </draw:text-box>
        </draw:frame>
        <draw:frame presentation:style-name="Mpr10" draw:text-style-name="MP20" draw:layer="backgroundobjects" svg:width="9.369cm" svg:height="1.396cm" svg:x="0cm" svg:y="26.543cm" presentation:class="footer">
          <draw:text-box>
            <text:p text:style-name="MP19"><presentation:footer/></text:p>
          </draw:text-box>
        </draw:frame>
        <draw:frame presentation:style-name="Mpr10" draw:text-style-name="MP22" draw:layer="backgroundobjects" svg:width="9.369cm" svg:height="1.396cm" svg:x="12.22cm" svg:y="26.543cm" presentation:class="page-number">
          <draw:text-box>
            <text:p text:style-name="MP21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1">
      <loext:theme loext:name="Office">
        <loext:theme-colors loext:name="Classic">
          <loext:color loext:name="dark1" loext:color="#000000"/>
          <loext:color loext:name="light1" loext:color="#ffffff"/>
          <loext:color loext:name="dark2" loext:color="#2e2706"/>
          <loext:color loext:name="light2" loext:color="#eeeeee"/>
          <loext:color loext:name="accent1" loext:color="#3465a4"/>
          <loext:color loext:name="accent2" loext:color="#168253"/>
          <loext:color loext:name="accent3" loext:color="#d62e4e"/>
          <loext:color loext:name="accent4" loext:color="#729fcf"/>
          <loext:color loext:name="accent5" loext:color="#5eb91e"/>
          <loext:color loext:name="accent6" loext:color="#ea7500"/>
          <loext:color loext:name="hyperlink" loext:color="#0060ff"/>
          <loext:color loext:name="followed-hyperlink" loext:color="#8020d9"/>
        </loext:theme-colors>
      </loext:theme>
      <draw:frame draw:name="PlaceHolder 1" presentation:style-name="Mpr11" draw:text-style-name="MP6" draw:layer="backgroundobjects" svg:width="25.196cm" svg:height="2.627cm" svg:x="1.399cm" svg:y="0.627cm" presentation:class="title" presentation:user-transformed="true">
        <draw:text-box>
          <text:p text:style-name="MP5"><text:span text:style-name="MT1">Click to edit the title text format</text:span></text:p>
        </draw:text-box>
      </draw:frame>
      <draw:frame draw:name="PlaceHolder 2" presentation:style-name="Mpr12" draw:text-style-name="MP12" draw:layer="backgroundobjects" svg:width="25.196cm" svg:height="9.131cm" svg:x="1.399cm" svg:y="3.684cm" presentation:class="outline" presentation:user-transformed="true">
        <draw:text-box>
          <text:list text:style-name="ML3">
            <text:list-item>
              <text:p text:style-name="MP7"><text:span text:style-name="MT2">Click to edit the outline text format</text:span></text:p>
            </text:list-item>
          </text:list>
          <text:list text:style-name="ML4">
            <text:list-item>
              <text:list>
                <text:list-item>
                  <text:p text:style-name="MP8"><text:span text:style-name="MT3">Second Outline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9"><text:span text:style-name="MT4">Third Outline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5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5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11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11"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13" draw:text-style-name="MP14" draw:layer="backgroundobjects" svg:width="8.872cm" svg:height="1.082cm" svg:x="9.575cm" svg:y="14.347cm" presentation:class="footer" presentation:user-transformed="true">
        <draw:text-box>
          <text:p text:style-name="MP13"><text:span text:style-name="MT6"><presentation:footer/></text:span></text:p>
        </draw:text-box>
      </draw:frame>
      <draw:custom-shape draw:style-name="Mgr3" draw:text-style-name="MP15" draw:layer="backgroundobjects" svg:width="27.997cm" svg:height="0.632cm" svg:x="0cm" svg:y="0.001cm">
        <text:p/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4" presentation:style-name="Mpr13" draw:text-style-name="MP17" draw:layer="backgroundobjects" svg:width="6.519cm" svg:height="1.082cm" svg:x="1.399cm" svg:y="14.347cm" presentation:class="date-time" presentation:user-transformed="true">
        <draw:text-box>
          <text:p text:style-name="MP16"><text:span text:style-name="MT6"><presentation:date-time/></text:span></text:p>
        </draw:text-box>
      </draw:frame>
      <draw:frame draw:name="PlaceHolder 5" presentation:style-name="Mpr13" draw:text-style-name="MP17" draw:layer="backgroundobjects" svg:width="6.519cm" svg:height="1.082cm" svg:x="20.075cm" svg:y="14.347cm" presentation:class="page-number" presentation:user-transformed="true">
        <draw:text-box>
          <text:p text:style-name="MP18"><text:span text:style-name="MT6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0cm" svg:height="0cm" svg:x="0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0" draw:layer="backgroundobjects" svg:width="9.369cm" svg:height="1.396cm" svg:x="0cm" svg:y="0cm" presentation:class="header">
          <draw:text-box>
            <text:p text:style-name="MP19"><presentation:header/></text:p>
          </draw:text-box>
        </draw:frame>
        <draw:frame presentation:style-name="Mpr14" draw:text-style-name="MP22" draw:layer="backgroundobjects" svg:width="9.369cm" svg:height="1.396cm" svg:x="12.22cm" svg:y="0cm" presentation:class="date-time">
          <draw:text-box>
            <text:p text:style-name="MP21"><presentation:date-time/></text:p>
          </draw:text-box>
        </draw:frame>
        <draw:frame presentation:style-name="Mpr15" draw:text-style-name="MP20" draw:layer="backgroundobjects" svg:width="9.369cm" svg:height="1.396cm" svg:x="0cm" svg:y="26.543cm" presentation:class="footer">
          <draw:text-box>
            <text:p text:style-name="MP19"><presentation:footer/></text:p>
          </draw:text-box>
        </draw:frame>
        <draw:frame presentation:style-name="Mpr15" draw:text-style-name="MP22" draw:layer="backgroundobjects" svg:width="9.369cm" svg:height="1.396cm" svg:x="12.22cm" svg:y="26.543cm" presentation:class="page-number">
          <draw:text-box>
            <text:p text:style-name="MP21"><text:page-number>&lt;number&gt;</text:page-number></text:p>
          </draw:text-box>
        </draw:frame>
      </presentation:notes>
    </style:master-page>
    <style:master-page style:name="Title" style:page-layout-name="PM1" draw:style-name="Mdp2">
      <loext:theme loext:name="Office">
        <loext:theme-colors loext:name="Classic">
          <loext:color loext:name="dark1" loext:color="#000000"/>
          <loext:color loext:name="light1" loext:color="#ffffff"/>
          <loext:color loext:name="dark2" loext:color="#2e2706"/>
          <loext:color loext:name="light2" loext:color="#eeeeee"/>
          <loext:color loext:name="accent1" loext:color="#3465a4"/>
          <loext:color loext:name="accent2" loext:color="#168253"/>
          <loext:color loext:name="accent3" loext:color="#d62e4e"/>
          <loext:color loext:name="accent4" loext:color="#729fcf"/>
          <loext:color loext:name="accent5" loext:color="#5eb91e"/>
          <loext:color loext:name="accent6" loext:color="#ea7500"/>
          <loext:color loext:name="hyperlink" loext:color="#0060ff"/>
          <loext:color loext:name="followed-hyperlink" loext:color="#8020d9"/>
        </loext:theme-colors>
      </loext:theme>
      <draw:frame draw:name="PlaceHolder 1" presentation:style-name="Mpr16" draw:text-style-name="MP24" draw:layer="backgroundobjects" svg:width="25.195cm" svg:height="2.626cm" svg:x="1.399cm" svg:y="5.628cm" presentation:class="title" presentation:user-transformed="true">
        <draw:text-box>
          <text:p text:style-name="MP23"><text:span text:style-name="MT7">Click to edit the title text format</text:span></text:p>
        </draw:text-box>
      </draw:frame>
      <draw:frame draw:name="PlaceHolder 2" presentation:style-name="Mpr17" draw:text-style-name="MP30" draw:layer="backgroundobjects" svg:width="25.195cm" svg:height="4.164cm" svg:x="1.399cm" svg:y="9.752cm" presentation:class="outline" presentation:user-transformed="true">
        <draw:text-box>
          <text:list text:style-name="ML13">
            <text:list-item>
              <text:p text:style-name="MP25"><text:span text:style-name="MT8">Click to edit the outline text format</text:span></text:p>
            </text:list-item>
          </text:list>
          <text:list text:style-name="ML14">
            <text:list-item>
              <text:list>
                <text:list-item text:start-value="1">
                  <text:p text:style-name="MP26"><text:span text:style-name="MT8">Second Outline Level</text:span></text:p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 text:start-value="1">
                      <text:p text:style-name="MP27"><text:span text:style-name="MT8">Third Outline Level</text:span></text:p>
                    </text:list-item>
                  </text:list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list>
                        <text:list-item text:start-value="1">
                          <text:p text:style-name="MP28"><text:span text:style-name="MT8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 text:start-value="1">
                              <text:p text:style-name="MP29"><text:span text:style-name="MT8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 text:start-value="1">
                                  <text:p text:style-name="MP29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 text:start-value="1">
                                      <text:p text:style-name="MP29"><text:span text:style-name="MT8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18" draw:text-style-name="MP17" draw:layer="backgroundobjects" svg:width="6.519cm" svg:height="1.082cm" svg:x="1.399cm" svg:y="14.347cm" presentation:class="date-time" presentation:user-transformed="true">
        <draw:text-box>
          <text:p text:style-name="MP16"><text:span text:style-name="MT9"><presentation:date-time/></text:span></text:p>
        </draw:text-box>
      </draw:frame>
      <draw:frame draw:name="PlaceHolder 4" presentation:style-name="Mpr18" draw:text-style-name="MP14" draw:layer="backgroundobjects" svg:width="8.872cm" svg:height="1.082cm" svg:x="9.575cm" svg:y="14.347cm" presentation:class="footer" presentation:user-transformed="true">
        <draw:text-box>
          <text:p text:style-name="MP13"><text:span text:style-name="MT9"><presentation:footer/></text:span></text:p>
        </draw:text-box>
      </draw:frame>
      <draw:frame draw:name="PlaceHolder 5" presentation:style-name="Mpr18" draw:text-style-name="MP17" draw:layer="backgroundobjects" svg:width="6.519cm" svg:height="1.082cm" svg:x="20.075cm" svg:y="14.347cm" presentation:class="page-number" presentation:user-transformed="true">
        <draw:text-box>
          <text:p text:style-name="MP18"><text:span text:style-name="MT9"><text:page-number>&lt;number&gt;</text:page-number></text:span></text:p>
        </draw:text-box>
      </draw:frame>
      <presentation:notes style:page-layout-name="PM0">
        <draw:page-thumbnail presentation:style-name="Title-title" draw:layer="backgroundobjects" svg:width="0cm" svg:height="0cm" svg:x="0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0" draw:layer="backgroundobjects" svg:width="9.369cm" svg:height="1.396cm" svg:x="0cm" svg:y="0cm" presentation:class="header">
          <draw:text-box>
            <text:p text:style-name="MP19"><presentation:header/></text:p>
          </draw:text-box>
        </draw:frame>
        <draw:frame presentation:style-name="Mpr19" draw:text-style-name="MP22" draw:layer="backgroundobjects" svg:width="9.369cm" svg:height="1.396cm" svg:x="12.22cm" svg:y="0cm" presentation:class="date-time">
          <draw:text-box>
            <text:p text:style-name="MP21"><presentation:date-time/></text:p>
          </draw:text-box>
        </draw:frame>
        <draw:frame presentation:style-name="Mpr20" draw:text-style-name="MP20" draw:layer="backgroundobjects" svg:width="9.369cm" svg:height="1.396cm" svg:x="0cm" svg:y="26.543cm" presentation:class="footer">
          <draw:text-box>
            <text:p text:style-name="MP19"><presentation:footer/></text:p>
          </draw:text-box>
        </draw:frame>
        <draw:frame presentation:style-name="Mpr20" draw:text-style-name="MP22" draw:layer="backgroundobjects" svg:width="9.369cm" svg:height="1.396cm" svg:x="12.22cm" svg:y="26.543cm" presentation:class="page-number">
          <draw:text-box>
            <text:p text:style-name="MP21"><text:page-number>&lt;number&gt;</text:page-number></text:p>
          </draw:text-box>
        </draw:frame>
      </presentation:notes>
    </style:master-page>
    <style:master-page style:name="Default_20_3" style:display-name="Default 3" style:page-layout-name="PM1" draw:style-name="Mdp2">
      <loext:theme loext:name="Office">
        <loext:theme-colors loext:name="Classic">
          <loext:color loext:name="dark1" loext:color="#000000"/>
          <loext:color loext:name="light1" loext:color="#ffffff"/>
          <loext:color loext:name="dark2" loext:color="#2e2706"/>
          <loext:color loext:name="light2" loext:color="#eeeeee"/>
          <loext:color loext:name="accent1" loext:color="#3465a4"/>
          <loext:color loext:name="accent2" loext:color="#168253"/>
          <loext:color loext:name="accent3" loext:color="#d62e4e"/>
          <loext:color loext:name="accent4" loext:color="#729fcf"/>
          <loext:color loext:name="accent5" loext:color="#5eb91e"/>
          <loext:color loext:name="accent6" loext:color="#ea7500"/>
          <loext:color loext:name="hyperlink" loext:color="#0060ff"/>
          <loext:color loext:name="followed-hyperlink" loext:color="#8020d9"/>
        </loext:theme-colors>
      </loext:theme>
      <draw:frame draw:name="PlaceHolder 1" presentation:style-name="Mpr21" draw:text-style-name="MP24" draw:layer="backgroundobjects" svg:width="25.195cm" svg:height="2.626cm" svg:x="1.399cm" svg:y="5.628cm" presentation:class="title" presentation:user-transformed="true">
        <draw:text-box>
          <text:p text:style-name="MP23"><text:span text:style-name="MT7">Click to edit the title text format</text:span></text:p>
        </draw:text-box>
      </draw:frame>
      <draw:frame draw:name="PlaceHolder 2" presentation:style-name="Mpr22" draw:text-style-name="MP30" draw:layer="backgroundobjects" svg:width="25.195cm" svg:height="4.164cm" svg:x="1.399cm" svg:y="9.752cm" presentation:class="outline" presentation:user-transformed="true">
        <draw:text-box>
          <text:list text:style-name="ML13">
            <text:list-item>
              <text:p text:style-name="MP25"><text:span text:style-name="MT8">Click to edit the outline text format</text:span></text:p>
            </text:list-item>
          </text:list>
          <text:list text:style-name="ML14">
            <text:list-item>
              <text:list>
                <text:list-item text:start-value="1">
                  <text:p text:style-name="MP26"><text:span text:style-name="MT8">Second Outline Level</text:span></text:p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 text:start-value="1">
                      <text:p text:style-name="MP27"><text:span text:style-name="MT8">Third Outline Level</text:span></text:p>
                    </text:list-item>
                  </text:list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list>
                        <text:list-item text:start-value="1">
                          <text:p text:style-name="MP28"><text:span text:style-name="MT8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 text:start-value="1">
                              <text:p text:style-name="MP29"><text:span text:style-name="MT8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 text:start-value="1">
                                  <text:p text:style-name="MP29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 text:start-value="1">
                                      <text:p text:style-name="MP29"><text:span text:style-name="MT8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23" draw:text-style-name="MP17" draw:layer="backgroundobjects" svg:width="6.519cm" svg:height="1.082cm" svg:x="1.399cm" svg:y="14.347cm" presentation:class="date-time" presentation:user-transformed="true">
        <draw:text-box>
          <text:p text:style-name="MP16"><text:span text:style-name="MT9"><presentation:date-time/></text:span></text:p>
        </draw:text-box>
      </draw:frame>
      <draw:frame draw:name="PlaceHolder 4" presentation:style-name="Mpr23" draw:text-style-name="MP14" draw:layer="backgroundobjects" svg:width="8.872cm" svg:height="1.082cm" svg:x="9.575cm" svg:y="14.347cm" presentation:class="footer" presentation:user-transformed="true">
        <draw:text-box>
          <text:p text:style-name="MP13"><text:span text:style-name="MT9"><presentation:footer/></text:span></text:p>
        </draw:text-box>
      </draw:frame>
      <draw:frame draw:name="PlaceHolder 5" presentation:style-name="Mpr23" draw:text-style-name="MP17" draw:layer="backgroundobjects" svg:width="6.519cm" svg:height="1.082cm" svg:x="20.075cm" svg:y="14.347cm" presentation:class="page-number" presentation:user-transformed="true">
        <draw:text-box>
          <text:p text:style-name="MP18"><text:span text:style-name="MT9"><text:page-number>&lt;number&gt;</text:page-number></text:span></text:p>
        </draw:text-box>
      </draw:frame>
      <presentation:notes style:page-layout-name="PM0">
        <draw:page-thumbnail presentation:style-name="Default_20_3-title" draw:layer="backgroundobjects" svg:width="0cm" svg:height="0cm" svg:x="0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20" draw:layer="backgroundobjects" svg:width="9.369cm" svg:height="1.396cm" svg:x="0cm" svg:y="0cm" presentation:class="header">
          <draw:text-box>
            <text:p text:style-name="MP19"><presentation:header/></text:p>
          </draw:text-box>
        </draw:frame>
        <draw:frame presentation:style-name="Mpr24" draw:text-style-name="MP22" draw:layer="backgroundobjects" svg:width="9.369cm" svg:height="1.396cm" svg:x="12.22cm" svg:y="0cm" presentation:class="date-time">
          <draw:text-box>
            <text:p text:style-name="MP21"><presentation:date-time/></text:p>
          </draw:text-box>
        </draw:frame>
        <draw:frame presentation:style-name="Mpr25" draw:text-style-name="MP20" draw:layer="backgroundobjects" svg:width="9.369cm" svg:height="1.396cm" svg:x="0cm" svg:y="26.543cm" presentation:class="footer">
          <draw:text-box>
            <text:p text:style-name="MP19"><presentation:footer/></text:p>
          </draw:text-box>
        </draw:frame>
        <draw:frame presentation:style-name="Mpr25" draw:text-style-name="MP22" draw:layer="backgroundobjects" svg:width="9.369cm" svg:height="1.396cm" svg:x="12.22cm" svg:y="26.543cm" presentation:class="page-number">
          <draw:text-box>
            <text:p text:style-name="MP21"><text:page-number>&lt;number&gt;</text:page-number></text:p>
          </draw:text-box>
        </draw:frame>
      </presentation:notes>
    </style:master-page>
    <style:master-page style:name="Default_20_4" style:display-name="Default 4" style:page-layout-name="PM1" draw:style-name="Mdp2">
      <loext:theme loext:name="Office">
        <loext:theme-colors loext:name="Classic">
          <loext:color loext:name="dark1" loext:color="#000000"/>
          <loext:color loext:name="light1" loext:color="#ffffff"/>
          <loext:color loext:name="dark2" loext:color="#2e2706"/>
          <loext:color loext:name="light2" loext:color="#eeeeee"/>
          <loext:color loext:name="accent1" loext:color="#3465a4"/>
          <loext:color loext:name="accent2" loext:color="#168253"/>
          <loext:color loext:name="accent3" loext:color="#d62e4e"/>
          <loext:color loext:name="accent4" loext:color="#729fcf"/>
          <loext:color loext:name="accent5" loext:color="#5eb91e"/>
          <loext:color loext:name="accent6" loext:color="#ea7500"/>
          <loext:color loext:name="hyperlink" loext:color="#0060ff"/>
          <loext:color loext:name="followed-hyperlink" loext:color="#8020d9"/>
        </loext:theme-colors>
      </loext:theme>
      <draw:frame draw:name="PlaceHolder 1" presentation:style-name="Mpr26" draw:text-style-name="MP24" draw:layer="backgroundobjects" svg:width="25.195cm" svg:height="2.626cm" svg:x="1.399cm" svg:y="5.628cm" presentation:class="title" presentation:user-transformed="true">
        <draw:text-box>
          <text:p text:style-name="MP23"><text:span text:style-name="MT7">Click to edit the title text format</text:span></text:p>
        </draw:text-box>
      </draw:frame>
      <draw:frame draw:name="PlaceHolder 2" presentation:style-name="Mpr27" draw:text-style-name="MP30" draw:layer="backgroundobjects" svg:width="25.195cm" svg:height="4.164cm" svg:x="1.399cm" svg:y="9.752cm" presentation:class="outline" presentation:user-transformed="true">
        <draw:text-box>
          <text:list text:style-name="ML13">
            <text:list-item>
              <text:p text:style-name="MP25"><text:span text:style-name="MT8">Click to edit the outline text format</text:span></text:p>
            </text:list-item>
          </text:list>
          <text:list text:style-name="ML14">
            <text:list-item>
              <text:list>
                <text:list-item text:start-value="1">
                  <text:p text:style-name="MP26"><text:span text:style-name="MT8">Second Outline Level</text:span></text:p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 text:start-value="1">
                      <text:p text:style-name="MP27"><text:span text:style-name="MT8">Third Outline Level</text:span></text:p>
                    </text:list-item>
                  </text:list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list>
                        <text:list-item text:start-value="1">
                          <text:p text:style-name="MP28"><text:span text:style-name="MT8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 text:start-value="1">
                              <text:p text:style-name="MP29"><text:span text:style-name="MT8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 text:start-value="1">
                                  <text:p text:style-name="MP29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 text:start-value="1">
                                      <text:p text:style-name="MP29"><text:span text:style-name="MT8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28" draw:text-style-name="MP17" draw:layer="backgroundobjects" svg:width="6.519cm" svg:height="1.082cm" svg:x="1.399cm" svg:y="14.347cm" presentation:class="date-time" presentation:user-transformed="true">
        <draw:text-box>
          <text:p text:style-name="MP16"><text:span text:style-name="MT9"><presentation:date-time/></text:span></text:p>
        </draw:text-box>
      </draw:frame>
      <draw:frame draw:name="PlaceHolder 4" presentation:style-name="Mpr28" draw:text-style-name="MP14" draw:layer="backgroundobjects" svg:width="8.872cm" svg:height="1.082cm" svg:x="9.575cm" svg:y="14.347cm" presentation:class="footer" presentation:user-transformed="true">
        <draw:text-box>
          <text:p text:style-name="MP13"><text:span text:style-name="MT9"><presentation:footer/></text:span></text:p>
        </draw:text-box>
      </draw:frame>
      <draw:frame draw:name="PlaceHolder 5" presentation:style-name="Mpr28" draw:text-style-name="MP17" draw:layer="backgroundobjects" svg:width="6.519cm" svg:height="1.082cm" svg:x="20.075cm" svg:y="14.347cm" presentation:class="page-number" presentation:user-transformed="true">
        <draw:text-box>
          <text:p text:style-name="MP18"><text:span text:style-name="MT9"><text:page-number>&lt;number&gt;</text:page-number></text:span></text:p>
        </draw:text-box>
      </draw:frame>
      <presentation:notes style:page-layout-name="PM0">
        <draw:page-thumbnail presentation:style-name="Default_20_4-title" draw:layer="backgroundobjects" svg:width="0cm" svg:height="0cm" svg:x="0cm" svg:y="2.123cm" presentation:class="page"/>
        <draw:frame presentation:style-name="Default_20_4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0" draw:layer="backgroundobjects" svg:width="9.369cm" svg:height="1.396cm" svg:x="0cm" svg:y="0cm" presentation:class="header">
          <draw:text-box>
            <text:p text:style-name="MP19"><presentation:header/></text:p>
          </draw:text-box>
        </draw:frame>
        <draw:frame presentation:style-name="Mpr29" draw:text-style-name="MP22" draw:layer="backgroundobjects" svg:width="9.369cm" svg:height="1.396cm" svg:x="12.22cm" svg:y="0cm" presentation:class="date-time">
          <draw:text-box>
            <text:p text:style-name="MP21"><presentation:date-time/></text:p>
          </draw:text-box>
        </draw:frame>
        <draw:frame presentation:style-name="Mpr30" draw:text-style-name="MP20" draw:layer="backgroundobjects" svg:width="9.369cm" svg:height="1.396cm" svg:x="0cm" svg:y="26.543cm" presentation:class="footer">
          <draw:text-box>
            <text:p text:style-name="MP19"><presentation:footer/></text:p>
          </draw:text-box>
        </draw:frame>
        <draw:frame presentation:style-name="Mpr30" draw:text-style-name="MP22" draw:layer="backgroundobjects" svg:width="9.369cm" svg:height="1.396cm" svg:x="12.22cm" svg:y="26.543cm" presentation:class="page-number">
          <draw:text-box>
            <text:p text:style-name="MP21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1-02-07T13:25:20</meta:creation-date>
    <dc:language>en-US</dc:language>
    <dc:date>2026-07-17T16:00:35</dc:date>
    <meta:editing-cycles>3</meta:editing-cycles>
    <meta:editing-duration>P0D</meta:editing-duration>
    <meta:generator>Collabora_Office/26.04.1.4$Linux_AARCH64 LibreOffice_project/6040$Build-4</meta:generator>
    <meta:document-statistic meta:object-count="115"/>
    <meta:user-defined meta:name="AppVersion">15.0000</meta:user-defined>
  </office:meta>
</office:document-meta>
</file>